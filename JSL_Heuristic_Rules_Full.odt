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wmf;windows_formatname=&quot;Image WMF&quot;"/>
  <manifest:file-entry manifest:full-path="Configurations2/" manifest:media-type="application/vnd.sun.xml.ui.configuration"/>
  <manifest:file-entry manifest:full-path="Object 2" manifest:media-type=""/>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pitch="variable"/>
    <style:font-face style:name="Cambria1" svg:font-family="Cambria" style:font-family-generic="roman" style:font-pitch="variable"/>
    <style:font-face style:name="Courier" svg:font-family="Courier"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ing_20_1">
      <style:paragraph-properties fo:margin-top="0.847cm" fo:margin-bottom="0.499cm" style:contextual-spacing="false"/>
    </style:style>
    <style:style style:name="P2" style:family="paragraph" style:parent-style-name="Heading_20_2">
      <style:paragraph-properties fo:margin-top="0.353cm" fo:margin-bottom="0.499cm" style:contextual-spacing="false"/>
    </style:style>
    <style:style style:name="P3" style:family="paragraph" style:parent-style-name="Text_20_body" style:list-style-name="L1"/>
    <style:style style:name="P4" style:family="paragraph" style:parent-style-name="Heading_20_3">
      <style:paragraph-properties fo:margin-top="0.353cm" fo:margin-bottom="0.499cm" style:contextual-spacing="false"/>
    </style:style>
    <style:style style:name="P5" style:family="paragraph" style:parent-style-name="Preformatted_20_Text">
      <style:paragraph-properties fo:margin-left="0cm" fo:margin-right="0cm" fo:text-indent="0cm" style:auto-text-indent="false" style:writing-mode="lr-tb"/>
    </style:style>
    <style:style style:name="P6" style:family="paragraph" style:parent-style-name="Preformatted_20_Text">
      <style:paragraph-properties style:writing-mode="lr-tb"/>
    </style:style>
    <style:style style:name="P7" style:family="paragraph" style:parent-style-name="Preformatted_20_Text">
      <style:paragraph-properties fo:margin-top="0cm" fo:margin-bottom="0.499cm" style:contextual-spacing="false" style:writing-mode="lr-tb"/>
    </style:style>
    <style:style style:name="P8" style:family="paragraph" style:parent-style-name="Text_20_body" style:list-style-name="L2"/>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euristic Rules for JSL Gloss Interpretation – Fully Expanded and Hierarchized</text:h>
      <text:p text:style-name="Standard">This document presents a fully expanded, uniform, and hierarchically organised description of 30 heuristic rules for the interpretation of Japanese Sign Language (JSL) glosses. The goal is to provide a bridge between linguistic theory and computational implementation, especially for systems that must transform linear gloss sequences into structured semantic representations of the form Agent–Action–Patient, enriched with aspectual, spatial, and pragmatic information.<text:line-break/><text:line-break/>The rules are not intended as a rigid grammar, but as a layered set of defaults and biases. Potential conflicts are resolved through an explicit hierarchy: structural rules dominate, recovery rules fill gaps, modifier rules add information without changing core roles, and UNKNOWN-handling rules prevent the system from hallucinating content when the gloss is unclear.</text:p>
      <text:h text:style-name="Heading_20_2" text:outline-level="2">1. Verb as the Core of the Clause [Supported]</text:h>
      <text:p text:style-name="Standard">Linguistic details:<text:line-break/>In JSL, as in many other sign languages, the verb functions as the structural nucleus of the clause. It encodes the type of event (action, process, state) and determines valency: whether the clause expects zero, one, two, or more core arguments. Directional and agreement verbs additionally encode agent–patient relations via movement and orientation in space, while reduplication or lengthening of the verb may signal aspect (iterative, durative, habitual).<text:line-break/><text:line-break/>AI impact:<text:line-break/>For computational parsing, the verb must be detected first. The entire semantic structure of the clause is then organised around this pivot. Once a verb is identified:<text:line-break/>- Its lexical entry tells the system whether the clause is intransitive, transitive, ditransitive, etc.<text:line-break/>- Agent, patient and other roles are interpreted relative to this verb, not just linear word order.<text:line-break/>- Temporal, spatial, manner and intensity modifiers are attached primarily to this verb.<text:line-break/><text:line-break/>Examples:<text:line-break/>1) DOG SEE PT3<text:line-break/> <text:s text:c="2"/>Verb: SEE (core predicate)<text:line-break/> <text:s text:c="2"/>Candidate agent: DOG (topic / first noun)<text:line-break/> <text:s text:c="2"/>Patient: PT3 (post-verbal pointing; see Rule 12).<text:line-break/><text:line-break/>2) YESTERDAY IX1 BOOK BUY<text:line-break/> <text:s text:c="2"/>Verb: BUY<text:line-break/> <text:s text:c="2"/>Agent: IX1 (the signer)<text:line-break/><text:soft-page-break/> <text:s text:c="2"/>Patient: BOOK<text:line-break/> <text:s text:c="2"/>Time modifier: YESTERDAY (attached to BUY).<text:line-break/><text:line-break/>Implementation hint:<text:line-break/>Build a dedicated verb lexicon for JSL glosses. In a first pass, tag each token as VERB or non-VERB. For each clause, select the main finite verb as the anchor for triplet construction, attaching secondary predicates or aspectual auxiliaries as needed.</text:p>
      <text:h text:style-name="Heading_20_2" text:outline-level="2">2. Canonical SOV Order [Supported]</text:h>
      <text:p text:style-name="Standard">Linguistic details:<text:line-break/>JSL is influenced by spoken Japanese, whose canonical word order is Subject–Object–Verb (SOV). In neutral, non-focalised clauses, topics and subjects tend to appear first, followed by the object (patient), with the main verb in final position. However, as a visual–spatial language, JSL allows word-order flexibility for topicalisation, focus and spatial mapping, so SOV is a strong tendency rather than an absolute constraint.<text:line-break/><text:line-break/>AI impact:<text:line-break/>SOV order provides a robust statistical bias for role assignment when other cues are absent or ambiguous.<text:line-break/>- The first nominal (N1) is a strong candidate for discourse topic and often the agent/experiencer.<text:line-break/>- The noun immediately before the verb is a high-confidence candidate for patient (see Rule 11).<text:line-break/>- The verb often appears at the end of the clause, but additional tokens (PT, adverbs, boundary markers) may follow without changing the underlying roles.<text:line-break/><text:line-break/>Examples:<text:line-break/>WOMAN BOOK READ<text:line-break/> <text:s/>Topic / subject: WOMAN<text:line-break/> <text:s/>Patient: BOOK<text:line-break/> <text:s/>Verb: READ (clause-final).<text:line-break/><text:line-break/>YESTERDAY BOY BALL THROW<text:line-break/> <text:s/>Topic: BOY<text:line-break/> <text:s/>Patient: BALL<text:line-break/> <text:s/>Verb: THROW<text:line-break/> <text:s/>Time: YESTERDAY.<text:line-break/><text:line-break/>Implementation hint:<text:line-break/>Use SOV as a default ordering assumption. If directional information from PT or classifier usage contradicts this bias, prefer the more specific cue (e.g. Rule 12 or 15) while keeping SOV as a fallback when no better information is available.</text:p>
      <text:h text:style-name="Heading_20_2" text:outline-level="2"><text:soft-page-break/>3. Implicit Copula [Supported]</text:h>
      <text:p text:style-name="Standard">Linguistic details:<text:line-break/>JSL frequently omits an explicit copula (“to be”), especially in simple identificational or attributive clauses. Constructions of the form NOUN–NOUN express identity (“X is Y”), and NOUN–ADJECTIVE express attribution (“X is Adj”), without any overt verb. This parallels spoken Japanese, where the copula is often omitted in informal contexts.<text:line-break/><text:line-break/>AI impact:<text:line-break/>When a clause has no explicit verb and consists essentially of two content words (noun or adjective), the system should interpret it as an implicit copular construction:<text:line-break/>- Subject = first element<text:line-break/>- Action = BE (implicit)<text:line-break/>- Attribute / complement = second element<text:line-break/><text:line-break/>Examples:<text:line-break/>DOG BIG<text:line-break/> <text:s/>→ “The dog is big.”<text:line-break/> <text:s/>Subject: DOG<text:line-break/> <text:s/>Action: BE (implicit copula)<text:line-break/> <text:s/>Attribute: BIG.<text:line-break/><text:line-break/>MAN TEACHER<text:line-break/> <text:s/>→ “The man is a teacher.”<text:line-break/> <text:s/>Subject: MAN<text:line-break/> <text:s/>Action: BE<text:line-break/> <text:s/>Attribute: TEACHER.<text:line-break/><text:line-break/>Implementation hint:<text:line-break/>Apply this rule only when (i) no explicit verb is present and (ii) the clause is short and structurally simple. For longer sequences of NOUN–NOUN–NOUN, treat the structure more cautiously and rely on additional cues (prosody, boundary markers) if available.</text:p>
      <text:h text:style-name="Heading_20_2" text:outline-level="2">4. Copula “THING” [To Verify]</text:h>
      <text:p text:style-name="Standard">Linguistic details:<text:line-break/>Some JSL glossing conventions use a sign glossed as THING in a copular-like function. In constructions NOUN–THING–NOUN/ADJ, THING may act as a semantically light copular element (“X is (a) thing Y”) rather than as an independent argument. However, this usage is not universal and may vary across datasets.<text:line-break/><text:line-break/>AI impact:<text:line-break/>When the pattern NOUN – THING – NOUN/ADJ appears, the system can treat THING as a copular marker and map the sequence onto a BE relation:<text:line-break/> <text:s/>Subject = first noun<text:line-break/><text:soft-page-break/> <text:s/>Action = BE<text:line-break/> <text:s/>Attribute = second noun/adjective<text:line-break/><text:line-break/>Example:<text:line-break/>MAN THING TEACHER<text:line-break/> <text:s/>→ “The man is a teacher.”<text:line-break/><text:line-break/>If THING appears with clear nominal dependents (e.g. modifiers, numerals) and not between two content words, it may be safer to treat it as a true noun. Because this behaviour depends on the corpus, the rule remains “To Verify” and should be applied only when consistent with the glossing conventions of the data.</text:p>
      <text:h text:style-name="Heading_20_2" text:outline-level="2">5. First Noun as Discourse Topic [Supported]</text:h>
      <text:p text:style-name="Standard">Linguistic details:<text:line-break/>JSL, like Japanese, is topic-prominent. The first noun of an utterance often introduces or reactivates a discourse topic. Once a topic is established, subsequent clauses may omit explicit mention of it while still predicating events or properties about that referent.<text:line-break/><text:line-break/>AI impact:<text:line-break/>The parser should record the first noun in a clause (or in a discourse segment) as the current topic, unless a more explicit topic-marking construction is annotated. This topic:<text:line-break/>- Has priority in coreference resolution.<text:line-break/>- Serves as default agent/experiencer when subjects are omitted in later clauses.<text:line-break/>- May remain active across clause boundaries until replaced.<text:line-break/><text:line-break/>Examples:<text:line-break/>BOY, BOOK READ.<text:line-break/> <text:s/>Topic: BOY<text:line-break/> <text:s/>Current clause: agent = BOY, patient = BOOK.<text:line-break/><text:line-break/>LATER READ AGAIN.<text:line-break/> <text:s/>Agent: BOY (inherited from topic)<text:line-break/> <text:s/>Patient: BOOK (from previous context).<text:line-break/><text:line-break/>WOMAN, TODAY WORK, TIRED.<text:line-break/> <text:s/>Topic: WOMAN<text:line-break/> <text:s/>Both WORK and TIRED are interpreted as predicated of WOMAN.<text:line-break/><text:line-break/>Implementation hint:<text:line-break/>Maintain a “topic stack” or at least one active topic per discourse. Update it when a clearly new topic noun appears clause-initially or when specific topic-shift markers are present in the annotation.</text:p>
      <text:h text:style-name="Heading_20_2" text:outline-level="2"><text:soft-page-break/>6. Referential Continuity via IX/PT [Supported]</text:h>
      <text:p text:style-name="Standard">Linguistic details:<text:line-break/>Pointing signs (IX, PT) are the primary mechanism for establishing and maintaining reference in signing space. Each new referent can be associated with a locus (e.g. PT-a, PT-b). Later uses of the same locus refer back to the same entity, even across several clauses.<text:line-break/><text:line-break/>AI impact:<text:line-break/>The system must maintain a mapping between loci and discourse referents. When encountering PT/IX:<text:line-break/>- If the locus matches a previously stored one, resolve the PT to that referent.<text:line-break/>- If it is clearly new (no prior mapping), introduce a new discourse entity, if the context supports this.<text:line-break/>- If no sufficient context exists, keep the referent underspecified.<text:line-break/><text:line-break/>Example:<text:line-break/>WOMAN PT-a, MAN PT-b.<text:line-break/>LATER PT-a SEE PT-b.<text:line-break/> <text:s/>PT-a → WOMAN<text:line-break/> <text:s/>PT-b → MAN<text:line-break/> <text:s/>Clause: WOMAN sees MAN.<text:line-break/><text:line-break/>This referential mapping is independent of linear distance: PT-a may refer back to a noun introduced many clauses earlier, as long as the same locus is used consistently.</text:p>
      <text:h text:style-name="Heading_20_2" text:outline-level="2">7. Nominal Repetition for Focus or Plurality [Supported / To Verify]</text:h>
      <text:p text:style-name="Standard">Linguistic details:<text:line-break/>Repetition of nouns in JSL can convey either focus/emphasis or plurality. Prosody (speed, rhythm, separation) is crucial:<text:line-break/>- Slow, separated repetition often signals contrastive focus (“this specific X”).<text:line-break/>- Fast, rhythmic repetition suggests plurality (“many Xs”).<text:line-break/><text:line-break/>AI impact:<text:line-break/>Given appropriate annotation, the parser can distinguish:<text:line-break/>- DOG (slow) DOG (slow) RUN → mark DOG as focused or contrastive.<text:line-break/>- DOG-DOG-DOG (fast) RUN → assign quantity &gt; 1 for DOG.<text:line-break/><text:line-break/>In corpora, this may be encoded as DOG++, DOG#PL, or multiple DOG tokens. The system must map corpus-specific conventions to these two abstract functions (focus vs plural). Where prosodic information is absent, repetition should still bias towards plurality but with lower confidence.</text:p>
      <text:h text:style-name="Heading_20_2" text:outline-level="2"><text:soft-page-break/>8. Argument Omission [Supported]</text:h>
      <text:p text:style-name="Standard">Linguistic details:<text:line-break/>JSL, like Japanese, omits arguments that are inferable from context. Once a participant is topicalised or has been saliently mentioned, subsequent clauses may drop it. This holds for both agents and patients, leading to apparently “incomplete” clauses at the surface level.<text:line-break/><text:line-break/>AI impact:<text:line-break/>When a clause with a known transitive verb is missing one or more overt arguments, the system must recover them using discourse memory:<text:line-break/>1. Prefer the current topic (Rule 5) as the default agent, when compatible with the verb’s semantics.<text:line-break/>2. For omitted patients, reuse the most recent explicit patient when a patient-focus reading (Rule 10) is plausible.<text:line-break/>3. Only if neither of these applies, fall back to implicit IX1/IX2 (Rule 9).<text:line-break/><text:line-break/>Examples:<text:line-break/>BOY BOOK READ. LATER READ AGAIN.<text:line-break/> <text:s/>First clause: Agent = BOY, Patient = BOOK.<text:line-break/> <text:s/>Second clause: Agent = BOY (topic), Patient = BOOK (last patient).<text:line-break/><text:line-break/>TODAY WORK. TIRED.<text:line-break/> <text:s/>Topic = IX1 (signer) or previously established topic.<text:line-break/> <text:s/>Both WORK and TIRED are predicated of that referent.<text:line-break/><text:line-break/>Implementation hint:<text:line-break/>Keep a short-term memory of last agents and patients, with their discourse salience. Use these stored roles cautiously and never override explicit information.</text:p>
      <text:h text:style-name="Heading_20_2" text:outline-level="2">9. Implicit Subject (1st/2nd Person) [To Verify]</text:h>
      <text:p text:style-name="Standard">Linguistic details:<text:line-break/>When no explicit topic, noun or PT is available, JSL often relies on person-deixis defaults. A bare verb in isolation tends to be read as “I verb” in self-report or “you verb?” in questions addressed to the interlocutor, depending on context and non-manuals.<text:line-break/><text:line-break/>AI impact:<text:line-break/>Use IX1/IX2 defaults only as a last resort, when:<text:line-break/>- There is no active topic.<text:line-break/>- No explicit noun or PT can be used as agent.<text:line-break/>- The discourse context (e.g. questions, self-narration) strongly suggests an egocentric interpretation.<text:line-break/><text:line-break/>Examples:<text:line-break/>READ.<text:line-break/><text:soft-page-break/> <text:s/>In a self-narration context: “I read.”<text:line-break/><text:line-break/>UNDERSTAND?<text:line-break/> <text:s/>Addressed to the addressee: “Do you understand?”<text:line-break/><text:line-break/>The system must never override an existing explicit referent with an implicit IX1/IX2. This rule is “To Verify” because specific preferences may differ across corpora and genres.</text:p>
      <text:h text:style-name="Heading_20_2" text:outline-level="2">10. Patient-Focus (“Pseudo-Passive”) [Supported]</text:h>
      <text:p text:style-name="Standard">Linguistic details:<text:line-break/>Transitive verbs in JSL often appear with only one overt argument, which functions as the patient. The agent is demoted or left implicit, yielding a pseudo-passive, patient-focused reading. This is common in narratives where the affected entity is more important than the agent.<text:line-break/><text:line-break/>AI impact:<text:line-break/>When a lexically transitive verb appears with a single noun-like argument, treat that argument primarily as the patient. The agent is recovered via topic (Rule 5) or left underspecified.<text:line-break/><text:line-break/>Example:<text:line-break/>BOOK READ.<text:line-break/> <text:s/>Patient: BOOK<text:line-break/> <text:s/>Action: READ<text:line-break/> <text:s/>Agent: omitted or recoverable from topic.<text:line-break/> <text:s/>Interpretation: “The book was read” or “(Someone) read the book.”<text:line-break/><text:line-break/>This rule interacts with Rules 8 and 11: the pre-verbal noun is the patient, and omission indicates that the agent can be left implicit without loss of core meaning.</text:p>
      <text:h text:style-name="Heading_20_2" text:outline-level="2">11. Pre-Verbal Noun as Patient [Supported]</text:h>
      <text:p text:style-name="Standard">Linguistic details:<text:line-break/>Empirically, the noun immediately preceding the verb in JSL glosses is very often the patient in transitive clauses. This is consistent with SOV order, but remains a strong cue even when word order is slightly rearranged for topicalisation or focus.<text:line-break/><text:line-break/>AI impact:<text:line-break/>For a transitive verb, the noun directly before the verb should be treated as a high-confidence patient, unless a classifier or PT clearly indicates another object. This rule is one of the strongest role-assignment heuristics after verb detection.<text:line-break/><text:line-break/>Examples:<text:line-break/>WOMAN APPLE EAT.<text:line-break/> <text:s/>Pre-verbal noun: APPLE → patient.<text:line-break/><text:soft-page-break/><text:line-break/>TEACHER STUDENT HELP.<text:line-break/> <text:s/>Pre-verbal noun: STUDENT → patient (the one being helped).<text:line-break/><text:line-break/>Implementation hint:<text:line-break/>If there are multiple nouns before the verb, assign patient to the rightmost pre-verbal noun and treat earlier nouns as topics or agents, according to Rule 5.</text:p>
      <text:h text:style-name="Heading_20_2" text:outline-level="2">12. Post-Verbal PT as Patient [Supported]</text:h>
      <text:p text:style-name="Standard">Linguistic details:<text:line-break/>A PT sign following the verb is a strong indicator of the object or goal of the action, especially for directional verbs (LOOK, GIVE, SHOW, SEND, CALL, etc.). Even if the verb carries directional information in its movement, PT can clarify or emphasise the target.<text:line-break/><text:line-break/>AI impact:<text:line-break/>When a PT occurs immediately after the verb, assign that PT as the patient or goal of the action. This means that the semantic patient may appear to the right of the verb, even though the language is generally SOV at the surface.<text:line-break/><text:line-break/>Examples:<text:line-break/>LOOK PT3<text:line-break/> <text:s/>Verb: LOOK<text:line-break/> <text:s/>Patient: PT3 (entity at locus 3).<text:line-break/><text:line-break/>GIVE PT-b<text:line-break/> <text:s/>Verb: GIVE<text:line-break/> <text:s/>Goal/patient: PT-b (recipient).<text:line-break/><text:line-break/>This rule can override the SOV bias when PT provides a more explicit cue for the object than a pre-verbal noun, especially when the pre-verbal noun is better analysed as agent or topic.</text:p>
      <text:h text:style-name="Heading_20_2" text:outline-level="2">13. Ambiguous PT [To Verify]</text:h>
      <text:p text:style-name="Standard">Linguistic details:<text:line-break/>Not all PT tokens can be easily resolved. A pointing sign produced in neutral space, with no previously associated locus, may be ambiguous. Likewise, rapid or unclear PTs in conversational data can resist confident interpretation.<text:line-break/><text:line-break/>AI impact:<text:line-break/>If PT lacks a clear spatial or discourse referent, the system should:<text:line-break/>- Represent the PT as an underspecified or UNKNOWN referent.<text:line-break/>- Avoid forcing a link to the nearest noun simply due to linear proximity.<text:line-break/>- Wait for later context to clarify the referent, when possible.<text:line-break/><text:line-break/>Example:<text:line-break/><text:soft-page-break/>... PT? SEE<text:line-break/> <text:s/>If no previous locus matches this PT, its referent remains anonymous (“someone/something”) for the time being.<text:line-break/><text:line-break/>By keeping PT ambiguous instead of guessing, the system remains interpretable and avoids propagating errors into subsequent clauses.</text:p>
      <text:h text:style-name="Heading_20_2" text:outline-level="2">14. Classifiers (CL) Indicating Object Type [To Verify]</text:h>
      <text:p text:style-name="Standard">Linguistic details:<text:line-break/>Classifiers in JSL encode semantic classes such as flat objects, long thin objects, round objects, vehicles, human figures, etc. Once an object has been introduced, subsequent references may use only a classifier handshape to represent it in space, without repeating the noun.<text:line-break/><text:line-break/>AI impact:<text:line-break/>When a classifier appears with a verb, it can reveal the semantic type of an implicit argument.<text:line-break/>Examples:<text:line-break/>CL:FLAT-OBJECT MOVE-TO-PT3<text:line-break/> <text:s/>→ some flat object (paper, book, plate) moves to the entity at PT3.<text:line-break/><text:line-break/>CL:PERSON-WALK<text:line-break/> <text:s/>→ some human figure is walking; identity must be inferred from context.<text:line-break/><text:line-break/>The parser should map each CL label to a semantic class (e.g. BOOK-LIKE, HUMAN, VEHICLE) and use this class to link the CL back to the last compatible noun in discourse memory, or to represent an anonymous entity of that class, depending on context.</text:p>
      <text:h text:style-name="Heading_20_2" text:outline-level="2">15. Reconstruction via CL [To Verify]</text:h>
      <text:p text:style-name="Standard">Linguistic details:<text:line-break/>When a classifier replaces a full noun in later clauses, it serves to maintain reference to the same entity while emphasising its shape, trajectory or spatial location. The combination VERB + CL can thus reconstruct the nature of a missing argument.<text:line-break/><text:line-break/>AI impact:<text:line-break/>If a classifier appears where a patient would be expected, the system may:<text:line-break/>- Recover the semantic type of the missing object from the classifier label.<text:line-break/>- Link that classifier to the last noun compatible with this class.<text:line-break/>- Fill the patient role with this reconstructed referent.<text:line-break/><text:line-break/>Example:<text:line-break/>BOOK TABLE ON.<text:line-break/>Later: CL:BOOK GIVE PT3.<text:line-break/> <text:s/>Patient: BOOK (recovered via classifier)<text:line-break/><text:soft-page-break/> <text:s/>Goal: PT3.<text:line-break/><text:line-break/>This rule must be used cautiously, because classifiers can sometimes introduce new entities of the same class rather than refer to old ones. Corpus analysis is needed to calibrate this behaviour.</text:p>
      <text:h text:style-name="Heading_20_2" text:outline-level="2">16. CL or Repetition = Plurality or Emphasis [Supported]</text:h>
      <text:p text:style-name="Standard">Linguistic details:<text:line-break/>Repetition of classifiers or nouns serves either to mark plurality (many entities) or emphasis/focus. Fast, rhythmic repetition usually means “many”; slower, separated repetition often highlights one specific referent in a contrastive way.<text:line-break/><text:line-break/>AI impact:<text:line-break/>Based on corpus-specific encoding:<text:line-break/>- Fast repetition → quantity &gt; 1 (plural).<text:line-break/>- Slow repetition → mark the noun as in focus, without necessarily changing its number.<text:line-break/><text:line-break/>Examples:<text:line-break/>CL:PERSON-walk CL:PERSON-walk CL:PERSON-walk (fast)<text:line-break/> <text:s/>→ “Several people are walking.”<text:line-break/><text:line-break/>BOOK (slow) BOOK (slow) READ<text:line-break/> <text:s/>→ Emphasis on THAT book as topic or focus, rather than plurality.<text:line-break/><text:line-break/>The system should store this information as additional attributes of the entity (quantity, focus) without reassigning semantic roles.</text:p>
      <text:h text:style-name="Heading_20_2" text:outline-level="2">17. Adverbs of Time, Place, Manner [Supported]</text:h>
      <text:p text:style-name="Standard">Linguistic details:<text:line-break/>Adverbs specify temporal location (yesterday, tomorrow), spatial location (here, there, Tokyo), and manner (slowly, carefully). In JSL, they may appear clause-initially, pre-verbally or post-verbally. They do not affect who is agent or patient, but they are essential for event interpretation.<text:line-break/><text:line-break/>AI impact:<text:line-break/>The parser should attach these adverbs as structured metadata on the main verb of the clause:<text:line-break/>- time: YESTERDAY, TOMORROW, NOW, etc.<text:line-break/>- place: HERE, THERE, TOKYO, SCHOOL, etc.<text:line-break/>- manner: SLOWLY, QUICKLY, CAREFULLY, etc.<text:line-break/><text:line-break/>Examples:<text:line-break/>YESTERDAY WOMAN BOOK READ<text:line-break/> <text:s/>→ time = YESTERDAY.<text:line-break/><text:soft-page-break/><text:line-break/>WOMAN BOOK READ SLOWLY<text:line-break/> <text:s/>→ manner = SLOWLY.<text:line-break/><text:line-break/>TOKYO IX1 GO<text:line-break/> <text:s/>→ place = TOKYO.<text:line-break/><text:line-break/>Adverbs may follow the verb, so the verb is not always the last token in the gloss sequence, but the verb remains the semantic anchor to which these modifiers attach.</text:p>
      <text:h text:style-name="Heading_20_2" text:outline-level="2">18. Adverbs of Intensity [Supported]</text:h>
      <text:p text:style-name="Standard">Linguistic details:<text:line-break/>Intensity modifies how strongly an action is carried out. In sign languages, intensity can be encoded by modified movement (larger, more forceful) or by separate lexical signs (e.g. VERY, STRONG).<text:line-break/><text:line-break/>AI impact:<text:line-break/>Intensity should be captured in a dedicated field (e.g. intensity_level), independent of time, place and manner.<text:line-break/><text:line-break/>Example:<text:line-break/>WOMAN LOOK-STRONG PT3<text:line-break/> <text:s/>Verb: LOOK<text:line-break/> <text:s/>Patient: PT3<text:line-break/> <text:s/>intensity_level: HIGH.<text:line-break/><text:line-break/>The intensity does not alter semantic roles but refines the description of the action; it may later be used for pragmatic inference (e.g. emotional state).</text:p>
      <text:h text:style-name="Heading_20_2" text:outline-level="2">19. Attributes (Colors, Sizes) [Supported]</text:h>
      <text:p text:style-name="Standard">Linguistic details:<text:line-break/>Attributes like colours (RED, BLUE), sizes (BIG, SMALL), and other descriptive adjectives modify nouns. In glosses, they typically appear adjacent to the noun they describe.<text:line-break/><text:line-break/>AI impact:<text:line-break/>When an attribute sign appears near a noun, the parser should attach it to that noun rather than to the verb. This builds richer entity representations.<text:line-break/><text:line-break/>Examples:<text:line-break/>RED BOOK READ<text:line-break/> <text:s/>Noun: BOOK<text:line-break/> <text:s/>Attribute: RED.<text:line-break/><text:line-break/>GIRL SMALL RUN<text:line-break/><text:soft-page-break/> <text:s/>Noun: GIRL<text:line-break/> <text:s/>Attribute: SMALL<text:line-break/> <text:s/>Verb: RUN.<text:line-break/><text:line-break/>These attributes do not change the underlying triplet structure, but they are crucial if the representation later needs to be verbalised or compared across contexts.</text:p>
      <text:h text:style-name="Heading_20_2" text:outline-level="2">20. Numerals Indicating Quantity [To Verify]</text:h>
      <text:p text:style-name="Standard">Linguistic details:<text:line-break/>Numerals express how many entities are involved. In gloss, they can appear before or after the noun or classifier. Their attachment is determined mainly by adjacency, along with prosodic and spatial cues.<text:line-break/><text:line-break/>AI impact:<text:line-break/>A simple implementation is:<text:line-break/>- Attach the numeral to the nearest compatible noun or classifier.<text:line-break/>- Represent this as quantity = N in the semantic representation.<text:line-break/><text:line-break/>Examples:<text:line-break/>THREE DOG RUN<text:line-break/> <text:s/>→ DOG with quantity = 3.<text:line-break/><text:line-break/>DOG THREE RUN<text:line-break/> <text:s/>→ Same semantics; post-nominal numeric position.<text:line-break/><text:line-break/>In ambiguous structures (two candidate nouns close to the numeral), the system may fall back on topic status or SOV expectations to choose the correct host noun.</text:p>
      <text:h text:style-name="Heading_20_2" text:outline-level="2">21. Pragmatic Context Influence [To Verify]</text:h>
      <text:p text:style-name="Standard">Linguistic details:<text:line-break/>Prosody, non-manual markers (facial expression, body posture) and broader discourse structure introduce pragmatic nuance: politeness, irony, emotional attitude, habituality, narrative viewpoint, etc. In many corpora, these aspects are under-annotated or not annotated at all.<text:line-break/><text:line-break/>AI impact:<text:line-break/>Where pragmatic annotations exist, the parser should:<text:line-break/>- Distinguish habitual vs. single events (e.g. EVERYDAY + repeated verb → habitual).<text:line-break/>- Mark emotional colouring (e.g. SAY-angrily vs. SAY-neutrally).<text:line-break/>- Use discourse focus to prioritise certain referents in ambiguity resolution.<text:line-break/><text:line-break/>Example:<text:line-break/>EVERYDAY IX1 WORK (with repeated or rhythmical signing)<text:line-break/> <text:s/>→ aspect = HABITUAL rather than a single instance.<text:line-break/><text:soft-page-break/><text:line-break/>Since many datasets lack this layer, this rule remains “To Verify” and may be implemented as an optional extension to the core structural heuristics.</text:p>
      <text:h text:style-name="Heading_20_2" text:outline-level="2">22. Hierarchical Deixis [Supported]</text:h>
      <text:p text:style-name="Standard">Linguistic details:<text:line-break/>Deictic reference in JSL relies on a stable spatial map built up over discourse. PT/IX signs refer primarily to loci in space, not merely to the last mentioned noun. A PT made to locus “a” refers to the same entity across many clauses as long as that mapping is not explicitly changed.<text:line-break/><text:line-break/>AI impact:<text:line-break/>The parser must treat spatial loci as primary reference keys:<text:line-break/>- When a noun is first introduced with a PT (e.g. WOMAN PT-a), create a mapping locus a → WOMAN.<text:line-break/>- Subsequent PT-a tokens resolve to WOMAN, regardless of linear distance.<text:line-break/><text:line-break/>Example:<text:line-break/>WOMAN PT-a. … LATER PT-a LAUGH.<text:line-break/> <text:s/>PT-a: WOMAN<text:line-break/> <text:s/>Clause: WOMAN laughs.<text:line-break/><text:line-break/>This approach allows non-local coreference and avoids naive “nearest noun” mappings that ignore the spatial dimension of sign language reference.</text:p>
      <text:h text:style-name="Heading_20_2" text:outline-level="2">23. No Self-Reference Within a Clause [Supported]</text:h>
      <text:p text:style-name="Standard">Linguistic details:<text:line-break/>Within one clause, an entity seldom functions as both agent and patient unless explicitly marked as reflexive with signs like SELF or similar. This constraint is analogous to many spoken languages where a reflexive pronoun is required for self-directed actions.<text:line-break/><text:line-break/>AI impact:<text:line-break/>The parser should block interpretations where the same referent fills both agent and patient in the same clause unless a reflexive marker is present. In ambiguous examples like MAN SEE MAN, it should prefer an interpretation with two distinct men, unless context or a reflexive gloss indicates otherwise.<text:line-break/><text:line-break/>Example:<text:line-break/>MAN SEE MAN<text:line-break/> <text:s/>Default: two different referents.<text:line-break/> <text:s/>Reflexive required for “the man sees himself”: MAN SELF SEE.<text:line-break/><text:line-break/>This rule prevents unintended reflexivisation that would distort argument structure.</text:p>
      <text:h text:style-name="Heading_20_2" text:outline-level="2"><text:soft-page-break/>24. Iterative Aspect via Verb Repetition [To Verify]</text:h>
      <text:p text:style-name="Standard">Linguistic details:<text:line-break/>Repeated verbs often express iterative (repeated in a short time) or habitual aspect (repeated over longer intervals). Fast, compact repetition (e.g. KNOCK-KNOCK-KNOCK) suggests a rapid series of events; repetition distributed with adverbs like EVERYDAY suggests habit.<text:line-break/><text:line-break/>AI impact:<text:line-break/>When the same verb appears multiple times in close succession, the parser should mark aspect as ITERATIVE. When repeated over longer spans with frequency adverbs, mark aspect as HABITUAL.<text:line-break/><text:line-break/>Examples:<text:line-break/>KNOCK KNOCK KNOCK<text:line-break/> <text:s/>→ aspect = ITERATIVE (multiple knocks in one event).<text:line-break/><text:line-break/>EVERYDAY IX1 RUN RUN<text:line-break/> <text:s/>→ aspect = HABITUAL (running as a daily routine).<text:line-break/><text:line-break/>Aspect labels are stored on the verb; they do not alter the identity of agents and patients but refine temporal interpretation.</text:p>
      <text:h text:style-name="Heading_20_2" text:outline-level="2">25. Durative Aspect (Extended Signs) [To Verify]</text:h>
      <text:p text:style-name="Standard">Linguistic details:<text:line-break/>Lengthened or held verb signs express durative or continuous aspect. The sign may be annotated as EAT++++, LOOK——, etc., indicating that the action is sustained over time.<text:line-break/><text:line-break/>AI impact:<text:line-break/>When the gloss indicates extension, the parser should set duration = LONG or CONTINUOUS for that verb.<text:line-break/><text:line-break/>Example:<text:line-break/>IX1 LOOK—— PT3<text:line-break/> <text:s/>→ I look at PT3 for a long time (stare), not just a brief glance.<text:line-break/><text:line-break/>Durative aspect can combine with iterative or habitual readings when multiple cues co-occur, but by default it simply stretches the temporal contour of one event.</text:p>
      <text:h text:style-name="Heading_20_2" text:outline-level="2">26. Discourse Boundary Markers [To Verify]</text:h>
      <text:p text:style-name="Standard">Linguistic details:<text:line-break/>Signs like FINISH, UNTIL, END act as discourse punctuation. They segment narratives into episodes or mark the completion of an event before moving on.<text:line-break/><text:line-break/><text:soft-page-break/>AI impact:<text:line-break/>On encountering FINISH/UNTIL/END, the parser should:<text:line-break/>- Close the current clause or event block.<text:line-break/>- Start a new block for subsequent material.<text:line-break/><text:line-break/>Example:<text:line-break/>IX1 WORK FINISH. HOME GO.<text:line-break/> <text:s/>Clause 1: I worked (event completed).<text:line-break/> <text:s/>Clause 2: I went home (new event).<text:line-break/><text:line-break/>Boundary markers do not introduce new agents or patients, but they delimit how long previous role assignments remain active without reactivation.</text:p>
      <text:h text:style-name="Heading_20_2" text:outline-level="2">27. Role Reset After Boundaries [To Verify]</text:h>
      <text:p text:style-name="Standard">Linguistic details:<text:line-break/>After a clear discourse boundary, some roles may no longer be automatically inherited. While the global topic often persists, local roles like the most recent patient or agent may lose salience and require reintroduction if they are to be core arguments again.<text:line-break/><text:line-break/>AI impact:<text:line-break/>After processing a boundary:<text:line-break/>- Keep the discourse topic (Rule 5) available, unless a new topic is introduced.<text:line-break/>- Downgrade the salience of last agent/patient roles, so that they are not blindly reused across episodes.<text:line-break/>- Require explicit mention (noun or PT) to reactivate non-topic referents as core arguments.<text:line-break/><text:line-break/>This mechanism prevents unintended carry-over of participants between logically separate events.</text:p>
      <text:h text:style-name="Heading_20_2" text:outline-level="2">28. UNKNOWN Category Inheritance [Supported]</text:h>
      <text:p text:style-name="Standard">Linguistic details:<text:line-break/>UNKNOWN tokens in glosses indicate that the annotator could not identify the sign. However, when UNKNOWN appears in a list or coordination structure, it usually shares the same general category (e.g. noun, adjective) as its neighbours.<text:line-break/><text:line-break/>AI impact:<text:line-break/>When UNKNOWN occurs between or among clearly categorised items of the same type, infer that UNKNOWN likely shares that type. For example:<text:line-break/>DOG UNKNOWN CAT<text:line-break/> <text:s/>→ UNKNOWN is probably also a noun (another animal).<text:line-break/><text:line-break/>The system should set category = NOUN but keep lemma = UNKNOWN. This maintains structural coherence without pretending to know the exact lexical item.</text:p>
      <text:h text:style-name="Heading_20_2" text:outline-level="2"><text:soft-page-break/>29. Multiple UNKNOWN Tokens = Fusion [To Verify]</text:h>
      <text:p text:style-name="Standard">Linguistic details:<text:line-break/>Several UNKNOWN tokens in a row may represent a single complex sign, a compound, or an unsegmented fingerspelled word. Treating each UNKNOWN as a separate token may artificially inflate clause length and obscure structure.<text:line-break/><text:line-break/>AI impact:<text:line-break/>When two or more UNKNOWN tokens appear consecutively, merge them into a single semantic unit (UNKNOWN-SEQ). Assign one category if possible (using Rule 28), and treat this sequence as a single position in the clause.<text:line-break/><text:line-break/>Example:<text:line-break/>DOG UNKNOWN UNKNOWN RUN<text:line-break/> <text:s/>→ The UNKNOWN UNKNOWN cluster may be a name or complex adjective; merging it reduces noise in role assignment while preserving uncertainty.</text:p>
      <text:h text:style-name="Heading_20_2" text:outline-level="2">30. UNKNOWN Preferred Over Hallucination [Supported]</text:h>
      <text:p text:style-name="Standard">Linguistic details:<text:line-break/>In incomplete or noisy data, forcing a confident interpretation where none is warranted creates errors that are hard to detect and correct. Recognising uncertainty is linguistically and methodologically more honest.<text:line-break/><text:line-break/>AI impact:<text:line-break/>Whenever the system cannot reliably determine the meaning, category, or role of a gloss, it should keep it as UNKNOWN rather than hallucinating a value. This uncertainty can be propagated explicitly in the representation and later resolved by human annotators or more specialised models.<text:line-break/><text:line-break/>In practice:<text:line-break/>- Do not invent agents or patients solely to fit a pattern.<text:line-break/>- Do not guess lexical items without evidence.<text:line-break/>- Prefer partial but correct structures over complete but speculative ones.</text:p>
      <text:h text:style-name="Heading_20_2" text:outline-level="2">Hierarchical Application of the Rules</text:h>
      <text:p text:style-name="Standard">Hierarchical application of the rules:<text:line-break/><text:line-break/>To avoid apparent contradictions and to produce stable parses, the rules should be applied in ordered layers, from most structural to most permissive:<text:line-break/><text:line-break/>1. Structural core rules (high priority, non-overridable):<text:line-break/> <text:s text:c="2"/>– Rule 1 (Verb as core)<text:line-break/> <text:s text:c="2"/>– Rule 2 (Canonical SOV as bias)<text:line-break/> <text:s text:c="2"/>– Rule 5 (First noun as topic)<text:line-break/><text:soft-page-break/> <text:s text:c="2"/>– Rule 11 (Pre-verbal noun as patient)<text:line-break/> <text:s text:c="2"/>– Rule 12 (Post-verbal PT as patient)<text:line-break/> <text:s text:c="2"/>– Rule 23 (No self-reference without reflexive marker)<text:line-break/><text:line-break/>2. Argument recovery rules (fill missing roles, do not override structural assignments):<text:line-break/> <text:s text:c="2"/>– Rule 6 (Referential continuity via IX/PT)<text:line-break/> <text:s text:c="2"/>– Rule 8 (Argument omission)<text:line-break/> <text:s text:c="2"/>– Rule 9 (Implicit subject)<text:line-break/> <text:s text:c="2"/>– Rule 10 (Patient-focus)<text:line-break/><text:line-break/>3. Modifier rules (enrich meaning but keep core roles unchanged):<text:line-break/> <text:s text:c="2"/>– Rule 17 (Adverbs of time/place/manner)<text:line-break/> <text:s text:c="2"/>– Rule 18 (Intensity)<text:line-break/> <text:s text:c="2"/>– Rule 19 (Attributes)<text:line-break/> <text:s text:c="2"/>– Rule 20 (Numerals)<text:line-break/><text:line-break/>4. Contextual and classifier rules (refine patient identity, focus, and reference):<text:line-break/> <text:s text:c="2"/>– Rule 7 (Nominal repetition)<text:line-break/> <text:s text:c="2"/>– Rule 14 (Classifiers)<text:line-break/> <text:s text:c="2"/>– Rule 15 (Reconstruction via CL)<text:line-break/> <text:s text:c="2"/>– Rule 21 (Pragmatic influence)<text:line-break/><text:line-break/>5. Aspectual rules (shape temporal contour of events):<text:line-break/> <text:s text:c="2"/>– Rule 24 (Iterative aspect)<text:line-break/> <text:s text:c="2"/>– Rule 25 (Durative aspect)<text:line-break/><text:line-break/>6. Segmentation rules (control boundaries and role persistence):<text:line-break/> <text:s text:c="2"/>– Rule 26 (Discourse boundary markers)<text:line-break/> <text:s text:c="2"/>– Rule 27 (Role reset after boundaries)<text:line-break/><text:line-break/>7. UNKNOWN-handling rules (preserve uncertainty and structural coherence):<text:line-break/> <text:s text:c="2"/>– Rule 28 (UNKNOWN category inheritance)<text:line-break/> <text:s text:c="2"/>– Rule 29 (UNKNOWN fusion)<text:line-break/> <text:s text:c="2"/>– Rule 30 (UNKNOWN preferred over hallucination)<text:line-break/><text:line-break/>In a practical parsing pipeline, this hierarchy can be implemented as successive passes over the gloss data:<text:line-break/>- Step 1: Identify verbs and basic SOV structure (Rules 1, 2, 5, 11, 12, 23).<text:line-break/>- Step 2: Recover omitted arguments using topic, PT, and person defaults (Rules 6, 8, 9, 10).<text:line-break/>- Step 3: Attach adverbial and attributive modifiers (Rules 17–20).<text:line-break/>- Step 4: Refine referents via classifiers, repetition, and pragmatic cues (Rules 7, 14, 15, 21).<text:line-break/>- Step 5: Add aspectual information (Rules 24, 25).<text:line-break/>- Step 6: Apply discourse boundary rules and reset roles where needed (Rules 26, 27).<text:line-break/><text:soft-page-break/>- Step 7: Apply UNKNOWN management (Rules 28–30).<text:line-break/><text:line-break/>By following this ordered strategy, the system respects verb-central structure, accommodates flexible JSL word order, and integrates rich spatial and pragmatic information without losing control over semantic role assignment.<text:line-break/><text:line-break/></text:p>
      <text:h text:style-name="P1" text:outline-level="1"/>
      <text:h text:style-name="P2" text:outline-level="2"><text:s/>Règle 31 — Changement de personne (locuteur)</text:h>
      <text:p text:style-name="Text_20_body">Quand le <text:span text:style-name="Strong_20_Emphasis">locuteur change</text:span>, il se passe deux choses différentes :</text:p>
      <text:list text:style-name="L1">
        <text:list-item>
          <text:p text:style-name="P3"><text:s/><text:span text:style-name="Strong_20_Emphasis">l’espace de pointage (PT)</text:span> est <text:span text:style-name="Strong_20_Emphasis">annulé</text:span></text:p>
        </text:list-item>
        <text:list-item>
          <text:p text:style-name="P3"><text:s/><text:span text:style-name="Strong_20_Emphasis">le discours peut continuer</text:span></text:p>
        </text:list-item>
      </text:list>
      <text:p text:style-name="Text_20_body"><text:s/>Donc : <text:span text:style-name="Strong_20_Emphasis">on coupe l’espace, pas forcément le sens</text:span>.</text:p>
      <text:p text:style-name="Horizontal_20_Line"/>
      <text:h text:style-name="P4" text:outline-level="3">Implémentation (simple et propre)</text:h>
      <text:p text:style-name="P5"><text:span text:style-name="Source_20_Text">SI speaker_id change :</text:span></text:p>
      <text:p text:style-name="P6"><text:span text:style-name="Source_20_Text"><text:s text:c="2"/>- reset PT_map</text:span></text:p>
      <text:p text:style-name="P6"><text:span text:style-name="Source_20_Text"><text:s text:c="2"/>- reset last_patient</text:span></text:p>
      <text:p text:style-name="P6"><text:span text:style-name="Source_20_Text"><text:s text:c="2"/>- reset last_agent</text:span></text:p>
      <text:p text:style-name="P7"><text:span text:style-name="Source_20_Text"><text:s text:c="2"/>- topic_discursif = conservé (confidence faible)</text:span></text:p>
      <text:p text:style-name="Text_20_body">Important :</text:p>
      <text:list text:style-name="L2">
        <text:list-item>
          <text:p text:style-name="P8"><text:span text:style-name="Strong_20_Emphasis">PT jamais partagé</text:span></text:p>
        </text:list-item>
        <text:list-item>
          <text:p text:style-name="P8"><text:span text:style-name="Strong_20_Emphasis">agent possible via topic</text:span></text:p>
        </text:list-item>
        <text:list-item>
          <text:p text:style-name="P8"><text:span text:style-name="Strong_20_Emphasis">patient jamais hérité</text:span></text:p>
        </text:list-item>
      </text:list>
      <text:p text:style-name="Text_20_body"/>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pitch="variable"/>
    <style:font-face style:name="Cambria1" svg:font-family="Cambria" style:font-family-generic="roman" style:font-pitch="variable"/>
    <style:font-face style:name="Courier" svg:font-family="Courier"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1"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mbria1"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text-properties style:font-name="Cambria" fo:font-family="Cambria" style:font-pitch="variable"/>
    </style:style>
    <style:style style:name="ListLabel_20_2" style:display-name="ListLabel 2" style:family="text">
      <style:text-properties style:font-name="Cambria" fo:font-family="Cambria" style:font-pitch="variable"/>
    </style:style>
    <style:style style:name="ListLabel_20_3" style:display-name="ListLabel 3" style:family="text">
      <style:text-properties style:font-name="Cambria" fo:font-family="Cambria" style:font-pitch="variable"/>
    </style:style>
    <style:style style:name="ListLabel_20_4" style:display-name="ListLabel 4" style:family="text">
      <style:text-properties style:font-name="Cambria" fo:font-family="Cambria" style:font-pitch="variable"/>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python-docx</meta:initial-creator>
    <dc:description>generated by python-docx</dc:description>
    <meta:editing-cycles>2</meta:editing-cycles>
    <meta:creation-date>2013-12-23T23:15:00</meta:creation-date>
    <dc:date>2026-01-17T00:41:23.635000000</dc:date>
    <meta:editing-duration>PT15M36S</meta:editing-duration>
    <meta:generator>LibreOffice/24.8.0.3$Windows_X86_64 LibreOffice_project/0bdf1299c94fe897b119f97f3c613e9dca6be583</meta:generator>
    <meta:document-statistic meta:table-count="0" meta:image-count="0" meta:object-count="0" meta:page-count="18" meta:paragraph-count="79" meta:word-count="4684" meta:character-count="30618" meta:non-whitespace-character-count="25631"/>
    <meta:user-defined meta:name="AppVersion">14.0000</meta:user-defined>
    <meta:template xlink:type="simple" xlink:actuate="onRequest" xlink:title="Normal.dotm" xlink:href=""/>
  </office:meta>
</office:document-meta>
</file>